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9807" officeooo:paragraph-rsid="001a9807" style:font-weight-asian="bold" style:font-weight-complex="bold"/>
    </style:style>
    <style:style style:name="P2" style:family="paragraph" style:parent-style-name="Standard">
      <style:text-properties officeooo:rsid="001a9807" officeooo:paragraph-rsid="001a9807"/>
    </style:style>
    <style:style style:name="P3" style:family="paragraph" style:parent-style-name="Text_20_body">
      <style:text-properties officeooo:rsid="001a9807"/>
    </style:style>
    <style:style style:name="P4" style:family="paragraph" style:parent-style-name="Text_20_body">
      <style:text-properties officeooo:rsid="001a9807" officeooo:paragraph-rsid="001a9807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tempt the following questions. Take time to break the question down first and write the code to express your solution.</text:p>
      <text:p text:style-name="P2">1. Write a JavaScript program that displays the largest integer among two integers.</text:p>
      <text:p text:style-name="P2">2. Write a JavaScript conditional statement to find the sign of the product of three numbers. Display an alert box with the specified sign. </text:p>
      <text:p text:style-name="P3"><text:span text:style-name="T1">Sample numbers</text:span> : 3, -7, 2 </text:p>
      <text:p text:style-name="P3"><text:span text:style-name="Emphasis">Output </text:span>: The sign is -</text:p>
      <text:p text:style-name="P4">3. Write a JavaScript conditional statement to sort three numbers. Display an alert box to show the results.</text:p>
      <text:p text:style-name="P3"><text:span text:style-name="T1">Sample numbers</text:span> : 0, -1, 4</text:p>
      <text:p text:style-name="P3"><text:span text:style-name="Emphasis">Output </text:span>: 4, 0, -1 </text:p>
      <text:p text:style-name="P4">4. Write a JavaScript conditional statement to find the largest of five numbers. Display an alert box to show the results.</text:p>
      <text:p text:style-name="P3"><text:span text:style-name="T1">Sample numbers</text:span> : -5, -2, -6, 0, -1 </text:p>
      <text:p text:style-name="P3"><text:span text:style-name="Emphasis">Output </text:span>: 0 </text:p>
      <text:p text:style-name="P4">5. Write a JavaScript for loop that iterates from 0 to 15. For each iteration, it checks if the current number is odd or even, and displays a message on the screen. </text:p>
      <text:p text:style-name="P3"><text:span text:style-name="Emphasis">Sample Output :</text:span></text:p>
      <text:p text:style-name="P3">"0 is even"</text:p>
      <text:p text:style-name="P3">"1 is odd" </text:p>
      <text:p text:style-name="P3">"2 is even"</text:p>
      <text:p text:style-name="P4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1T10:17:58.937111856</meta:creation-date>
    <dc:date>2026-01-11T10:24:05.915095550</dc:date>
    <meta:editing-duration>PT6M9S</meta:editing-duration>
    <meta:editing-cycles>2</meta:editing-cycles>
    <meta:generator>LibreOffice/25.8.4.2$Linux_X86_64 LibreOffice_project/580$Build-2</meta:generator>
    <meta:document-statistic meta:table-count="0" meta:image-count="0" meta:object-count="0" meta:page-count="1" meta:paragraph-count="16" meta:word-count="174" meta:character-count="923" meta:non-whitespace-character-count="758"/>
  </office:meta>
</office:document-meta>
</file>